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18000002D89846E3E2.png" manifest:media-type="image/png"/>
  <manifest:file-entry manifest:full-path="Pictures/10000000000006EE000003771C23C507.png" manifest:media-type="image/png"/>
  <manifest:file-entry manifest:full-path="Pictures/10000001000000660000009030454A2A.png" manifest:media-type="image/png"/>
  <manifest:file-entry manifest:full-path="Pictures/10000001000000840000002D924FE083.png" manifest:media-type="image/png"/>
  <manifest:file-entry manifest:full-path="Pictures/10000001000000AA00000024088E88CA.png" manifest:media-type="image/png"/>
  <manifest:file-entry manifest:full-path="Pictures/1000000100000020000000202501B3CE.png" manifest:media-type="image/png"/>
  <manifest:file-entry manifest:full-path="Pictures/100000010000031F0000026F987478D0.png" manifest:media-type="image/png"/>
  <manifest:file-entry manifest:full-path="Pictures/10000001000003200000027507777E21.png" manifest:media-type="image/png"/>
  <manifest:file-entry manifest:full-path="Pictures/1000000100000316000002659566A97E.png" manifest:media-type="image/png"/>
  <manifest:file-entry manifest:full-path="Pictures/100000010000031F000002D4C87B7EC1.png" manifest:media-type="image/png"/>
  <manifest:file-entry manifest:full-path="Pictures/100000010000031E000002D644AD6BE2.png" manifest:media-type="image/png"/>
  <manifest:file-entry manifest:full-path="Pictures/10000001000005EB000003658004D02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6.591cm" fo:margin-left="-0.191cm" fo:margin-top="0cm" fo:margin-bottom="0cm" table:align="left" style:writing-mode="lr-tb"/>
    </style:style>
    <style:style style:name="Tabla2.A" style:family="table-column">
      <style:table-column-properties style:column-width="8.296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6.591cm" fo:margin-left="-0.191cm" fo:margin-top="0cm" fo:margin-bottom="0cm" table:align="left" style:writing-mode="lr-tb"/>
    </style:style>
    <style:style style:name="Tabla3.A" style:family="table-column">
      <style:table-column-properties style:column-width="8.296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6.591cm" fo:margin-left="-0.191cm" fo:margin-top="0cm" fo:margin-bottom="0cm" table:align="left" style:writing-mode="lr-tb"/>
    </style:style>
    <style:style style:name="Tabla4.A" style:family="table-column">
      <style:table-column-properties style:column-width="8.296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589cm" fo:margin-left="-0.191cm" fo:margin-top="0cm" fo:margin-bottom="0cm" table:align="left" style:writing-mode="lr-tb"/>
    </style:style>
    <style:style style:name="Tabla5.A" style:family="table-column">
      <style:table-column-properties style:column-width="5.53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6.588cm" fo:margin-left="-0.191cm" fo:margin-top="0cm" fo:margin-bottom="0cm" table:align="left" style:writing-mode="lr-tb"/>
    </style:style>
    <style:style style:name="Tabla6.A" style:family="table-column">
      <style:table-column-properties style:column-width="4.147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6.589cm" fo:margin-left="-0.191cm" fo:margin-top="0cm" fo:margin-bottom="0cm" table:align="left" style:writing-mode="lr-tb"/>
    </style:style>
    <style:style style:name="Tabla7.A" style:family="table-column">
      <style:table-column-properties style:column-width="5.53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6.591cm" fo:margin-left="-0.191cm" fo:margin-top="0cm" fo:margin-bottom="0cm" table:align="left" style:writing-mode="lr-tb"/>
    </style:style>
    <style:style style:name="Tabla8.A" style:family="table-column">
      <style:table-column-properties style:column-width="8.296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s" fo:country="ES"/>
    </style:style>
    <style:style style:name="P2" style:family="paragraph" style:parent-style-name="Standard">
      <style:paragraph-properties fo:text-align="center" style:justify-single-word="false"/>
      <style:text-properties fo:language="es" fo:country="ES"/>
    </style:style>
    <style:style style:name="P3" style:family="paragraph" style:parent-style-name="Standard">
      <style:paragraph-properties fo:line-height="150%" fo:text-align="center" style:justify-single-word="false"/>
      <style:text-properties fo:language="es" fo:country="ES"/>
    </style:style>
    <style:style style:name="P4" style:family="paragraph" style:parent-style-name="Standard">
      <style:paragraph-properties fo:line-height="150%" fo:text-align="justify" style:justify-single-word="false"/>
      <style:text-properties style:font-name="Arial" fo:font-size="12pt" fo:language="es" fo:country="ES" fo:font-weight="normal" style:font-size-asian="12pt" style:font-weight-asian="normal"/>
    </style:style>
    <style:style style:name="P5" style:family="paragraph" style:parent-style-name="Contents_20_1">
      <style:paragraph-properties>
        <style:tab-stops>
          <style:tab-stop style:position="16.589cm" style:type="right" style:leader-style="dotted" style:leader-text="."/>
        </style:tab-stops>
      </style:paragraph-properties>
    </style:style>
    <style:style style:name="P6" style:family="paragraph" style:parent-style-name="Contents_20_2">
      <style:paragraph-properties>
        <style:tab-stops>
          <style:tab-stop style:position="16.589cm" style:type="right" style:leader-style="dotted" style:leader-text="."/>
        </style:tab-stops>
      </style:paragraph-properties>
    </style:style>
    <style:style style:name="P7" style:family="paragraph" style:parent-style-name="Contents_20_3">
      <style:paragraph-properties>
        <style:tab-stops>
          <style:tab-stop style:position="16.589cm" style:type="right" style:leader-style="dotted" style:leader-text="."/>
        </style:tab-stops>
      </style:paragraph-properties>
    </style:style>
    <style:style style:name="P8" style:family="paragraph" style:parent-style-name="Heading_20_1">
      <style:paragraph-properties fo:margin-top="0cm" fo:margin-bottom="0cm" style:contextual-spacing="false" fo:line-height="150%" fo:break-before="page"/>
      <style:text-properties fo:language="es" fo:country="ES"/>
    </style:style>
    <style:style style:name="P9" style:family="paragraph" style:parent-style-name="Standard">
      <style:paragraph-properties fo:line-height="150%" fo:text-align="justify" style:justify-single-word="false"/>
      <style:text-properties fo:language="es" fo:country="ES"/>
    </style:style>
    <style:style style:name="P10" style:family="paragraph" style:parent-style-name="Heading_20_1">
      <style:paragraph-properties fo:line-height="150%"/>
      <style:text-properties fo:language="es" fo:country="ES"/>
    </style:style>
    <style:style style:name="P11" style:family="paragraph" style:parent-style-name="Heading_20_2">
      <style:paragraph-properties fo:line-height="150%"/>
      <style:text-properties fo:language="es" fo:country="ES"/>
    </style:style>
    <style:style style:name="P12" style:family="paragraph" style:parent-style-name="List_20_1" style:list-style-name="WWNum1">
      <style:paragraph-properties fo:line-height="150%" fo:text-align="justify" style:justify-single-word="false"/>
      <style:text-properties fo:language="es" fo:country="ES"/>
    </style:style>
    <style:style style:name="P13" style:family="paragraph" style:parent-style-name="Standard">
      <style:paragraph-properties fo:margin-top="0cm" fo:margin-bottom="0cm" style:contextual-spacing="false" fo:orphans="2" fo:widows="2"/>
      <style:text-properties fo:language="es" fo:country="ES" style:letter-kerning="false" style:language-asian="en" style:country-asian="US" style:font-name-complex="F" style:font-size-complex="11pt" style:language-complex="ar" style:country-complex="SA"/>
    </style:style>
    <style:style style:name="P14" style:family="paragraph" style:parent-style-name="Standard">
      <style:paragraph-properties fo:margin-top="0cm" fo:margin-bottom="0cm" style:contextual-spacing="false" fo:orphans="2" fo:widows="2"/>
      <style:text-properties fo:language="es" fo:country="ES" officeooo:rsid="000ce31f" officeooo:paragraph-rsid="000ce31f" style:letter-kerning="false" style:language-asian="en" style:country-asian="US" style:font-name-complex="F" style:font-size-complex="11pt" style:language-complex="ar" style:country-complex="SA"/>
    </style:style>
    <style:style style:name="P15" style:family="paragraph" style:parent-style-name="Numbering_20_1" style:list-style-name="WWNum5">
      <style:paragraph-properties fo:line-height="150%"/>
      <style:text-properties fo:language="es" fo:country="ES"/>
    </style:style>
    <style:style style:name="P16" style:family="paragraph" style:parent-style-name="Heading_20_3">
      <style:paragraph-properties fo:line-height="150%"/>
      <style:text-properties fo:language="es" fo:country="ES"/>
    </style:style>
    <style:style style:name="P17" style:family="paragraph" style:parent-style-name="Numbering_20_1" style:list-style-name="L1">
      <style:paragraph-properties fo:line-height="150%"/>
      <style:text-properties fo:language="es" fo:country="ES"/>
    </style:style>
    <style:style style:name="P18" style:family="paragraph" style:parent-style-name="Standard">
      <style:paragraph-properties fo:margin-left="0.499cm"/>
      <style:text-properties fo:language="es" fo:country="ES"/>
    </style:style>
    <style:style style:name="T1" style:family="text">
      <style:text-properties style:font-name="Arial" fo:font-size="10pt" fo:font-style="italic" style:font-size-asian="10pt" style:font-style-asian="italic"/>
    </style:style>
    <style:style style:name="T2" style:family="text">
      <style:text-properties style:font-name="Arial" fo:font-size="14pt" fo:font-weight="normal" style:font-size-asian="14pt" style:font-weight-asian="normal"/>
    </style:style>
    <style:style style:name="T3" style:family="text">
      <style:text-properties style:font-name="Arial" fo:font-size="12pt" fo:font-weight="normal" style:font-size-asian="12pt" style:font-weight-asian="normal"/>
    </style:style>
    <style:style style:name="T4" style:family="text">
      <style:text-properties style:font-name="Arial" fo:font-size="13pt" fo:font-weight="bold" style:font-size-asian="13pt" style:font-weight-asian="bold"/>
    </style:style>
    <style:style style:name="T5" style:family="text">
      <style:text-properties style:font-name="Arial" fo:font-size="22pt" fo:font-weight="bold" style:font-size-asian="22pt" style:font-weight-asian="bold"/>
    </style:style>
    <style:style style:name="T6" style:family="text">
      <style:text-properties style:font-name="Arial"/>
    </style:style>
    <style:style style:name="T7" style:family="text">
      <style:text-properties style:font-name="Arial" fo:font-size="12pt" fo:font-weight="normal" officeooo:rsid="000ce31f" style:font-size-asian="12pt" style:font-weight-asian="normal"/>
    </style:style>
    <style:style style:name="T8" style:family="text">
      <style:text-properties style:font-name="Arial" fo:font-size="12pt" style:font-size-asian="12pt"/>
    </style:style>
    <style:style style:name="T9" style:family="text">
      <style:text-properties style:font-name="Arial" fo:font-size="11pt" fo:font-weight="bold" style:font-size-asian="11pt" style:font-weight-asian="bold"/>
    </style:style>
    <style:style style:name="T10" style:family="text">
      <style:text-properties style:font-name="Arial" fo:font-size="11pt" style:font-size-asian="11pt"/>
    </style:style>
    <style:style style:name="T11" style:family="text">
      <style:text-properties fo:font-family="'Courier New'" style:font-family-generic="roman" style:font-pitch="variable" fo:font-size="10pt" style:font-size-asian="10pt"/>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Picture 1" text:anchor-type="as-char" svg:width="12cm" svg:height="6.001cm" draw:z-index="0"><draw:image xlink:href="Pictures/10000000000006EE000003771C23C507.png" xlink:type="simple" xlink:show="embed" xlink:actuate="onLoad" draw:mime-type="image/png"/></draw:frame></text:p>
      <text:p text:style-name="P2"><text:span text:style-name="T1">Figura 1. Fondo del menú principal (Bomb Champions)</text:span></text:p>
      <text:p text:style-name="P3"><text:span text:style-name="T2">IES El Álamo</text:span></text:p>
      <text:p text:style-name="P3"><text:span text:style-name="T3">[Localidad — confirmar con el centro]</text:span></text:p>
      <text:p text:style-name="P3"><text:span text:style-name="T4">Proyecto</text:span><text:span text:style-name="T4"> Intermodular SMR</text:span></text:p>
      <text:p text:style-name="P3"><text:span text:style-name="T3">(Sistemas Microinformáticos y Redes)</text:span></text:p>
      <text:p text:style-name="P3"><text:span text:style-name="T5">BOMB CHAMPIONS</text:span></text:p>
      <text:p text:style-name="P3"><text:span text:style-name="T3">Miguel Eduardo Marcano Ordaz</text:span></text:p>
      <text:p text:style-name="P3"><text:span text:style-name="T3">Gabriel Alejandro Celis Ordaz</text:span></text:p>
      <text:p text:style-name="P1"/>
      <text:p text:style-name="P3"><text:span text:style-name="T3">Tutor: Raúl Bernabé Sebastián</text:span></text:p>
      <text:p text:style-name="P1"/>
      <text:p text:style-name="P3"><text:span text:style-name="T3">Fecha de exposición: 5 de junio de 2026</text:span></text:p>
      <text:p text:style-name="P4"/>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Indice</text:p>
          </text:index-title>
          <text:p text:style-name="P5"><text:a xlink:type="simple" xlink:href="#__RefHeading___Toc1552_3088266502" office:name="2. Índice" text:style-name="Index_20_Link" text:visited-style-name="Index_20_Link">2. Índice<text:tab/>2</text:a></text:p>
          <text:p text:style-name="P5"><text:a xlink:type="simple" xlink:href="#__RefHeading___Toc1554_3088266502" office:name="3. Descripción general del proyecto" text:style-name="Index_20_Link" text:visited-style-name="Index_20_Link">3. Descripción general del proyecto<text:tab/>5</text:a></text:p>
          <text:p text:style-name="P5"><text:a xlink:type="simple" xlink:href="#__RefHeading___Toc1556_3088266502" office:name="4. Objetivos" text:style-name="Index_20_Link" text:visited-style-name="Index_20_Link">4. Objetivos<text:tab/>5</text:a></text:p>
          <text:p text:style-name="P6"><text:a xlink:type="simple" xlink:href="#__RefHeading___Toc1558_3088266502" office:name="4.1. Objetivos generales" text:style-name="Index_20_Link" text:visited-style-name="Index_20_Link">4.1. Objetivos generales<text:tab/>5</text:a></text:p>
          <text:p text:style-name="P6"><text:a xlink:type="simple" xlink:href="#__RefHeading___Toc1560_3088266502" office:name="4.2. Objetivos específicos" text:style-name="Index_20_Link" text:visited-style-name="Index_20_Link">4.2. Objetivos específicos<text:tab/>5</text:a></text:p>
          <text:p text:style-name="P5"><text:a xlink:type="simple" xlink:href="#__RefHeading___Toc1562_3088266502" office:name="5. Justificación de la opción elegida" text:style-name="Index_20_Link" text:visited-style-name="Index_20_Link">5. Justificación de la opción elegida<text:tab/>6</text:a></text:p>
          <text:p text:style-name="P6"><text:a xlink:type="simple" xlink:href="#__RefHeading___Toc1564_3088266502" office:name="5.1. Uso de inteligencia artificial en el desarrollo" text:style-name="Index_20_Link" text:visited-style-name="Index_20_Link">5.1. Uso de inteligencia artificial en el desarrollo<text:tab/>6</text:a></text:p>
          <text:p text:style-name="P7"><text:a xlink:type="simple" xlink:href="#__RefHeading___Toc1566_3088266502" office:name="Justificación formativa" text:style-name="Index_20_Link" text:visited-style-name="Index_20_Link">Justificación formativa<text:tab/>7</text:a></text:p>
          <text:p text:style-name="P7"><text:a xlink:type="simple" xlink:href="#__RefHeading___Toc1568_3088266502" office:name="Contexto del mercado laboral" text:style-name="Index_20_Link" text:visited-style-name="Index_20_Link">Contexto del mercado laboral<text:tab/>7</text:a></text:p>
          <text:p text:style-name="P5"><text:a xlink:type="simple" xlink:href="#__RefHeading___Toc1570_3088266502" office:name="6. Recursos necesarios" text:style-name="Index_20_Link" text:visited-style-name="Index_20_Link">6. Recursos necesarios<text:tab/>8</text:a></text:p>
          <text:p text:style-name="P6"><text:a xlink:type="simple" xlink:href="#__RefHeading___Toc1572_3088266502" office:name="6.1. Hardware" text:style-name="Index_20_Link" text:visited-style-name="Index_20_Link">6.1. Hardware<text:tab/>8</text:a></text:p>
          <text:p text:style-name="P6"><text:a xlink:type="simple" xlink:href="#__RefHeading___Toc1574_3088266502" office:name="6.2. Software" text:style-name="Index_20_Link" text:visited-style-name="Index_20_Link">6.2. Software<text:tab/>8</text:a></text:p>
          <text:p text:style-name="P6"><text:a xlink:type="simple" xlink:href="#__RefHeading___Toc1576_3088266502" office:name="6.3. Servicios en línea" text:style-name="Index_20_Link" text:visited-style-name="Index_20_Link">6.3. Servicios en línea<text:tab/>8</text:a></text:p>
          <text:p text:style-name="P5"><text:a xlink:type="simple" xlink:href="#__RefHeading___Toc1578_3088266502" office:name="7. Desarrollo del proyecto" text:style-name="Index_20_Link" text:visited-style-name="Index_20_Link">7. Desarrollo del proyecto<text:tab/>8</text:a></text:p>
          <text:p text:style-name="P6"><text:a xlink:type="simple" xlink:href="#__RefHeading___Toc1580_3088266502" office:name="7.1. Metodología y fases" text:style-name="Index_20_Link" text:visited-style-name="Index_20_Link">7.1. Metodología y fases<text:tab/>8</text:a></text:p>
          <text:p text:style-name="P6"><text:a xlink:type="simple" xlink:href="#__RefHeading___Toc1582_3088266502" office:name="7.2. Arquitectura del software" text:style-name="Index_20_Link" text:visited-style-name="Index_20_Link">7.2. Arquitectura del software<text:tab/>9</text:a></text:p>
          <text:p text:style-name="P6"><text:a xlink:type="simple" xlink:href="#__RefHeading___Toc1584_3088266502" office:name="7.3. Desarrollo técnico" text:style-name="Index_20_Link" text:visited-style-name="Index_20_Link">7.3. Desarrollo técnico<text:tab/>9</text:a></text:p>
          <text:p text:style-name="P7"><text:a xlink:type="simple" xlink:href="#__RefHeading___Toc1586_3088266502" office:name="Implementado" text:style-name="Index_20_Link" text:visited-style-name="Index_20_Link">Implementado<text:tab/>9</text:a></text:p>
          <text:p text:style-name="P7"><text:a xlink:type="simple" xlink:href="#__RefHeading___Toc1588_3088266502" office:name="Mapa — tipos de celda" text:style-name="Index_20_Link" text:visited-style-name="Index_20_Link">Mapa — tipos de celda<text:tab/>10</text:a></text:p>
          <text:p text:style-name="P7"><text:a xlink:type="simple" xlink:href="#__RefHeading___Toc1590_3088266502" office:name="Controles (partida local)" text:style-name="Index_20_Link" text:visited-style-name="Index_20_Link">Controles (partida local)<text:tab/>10</text:a></text:p>
          <text:p text:style-name="P6"><text:a xlink:type="simple" xlink:href="#__RefHeading___Toc1592_3088266502" office:name="7.4. Diseño gráfico y assets" text:style-name="Index_20_Link" text:visited-style-name="Index_20_Link">7.4. Diseño gráfico y assets<text:tab/>10</text:a></text:p>
          <text:p text:style-name="P6"><text:a xlink:type="simple" xlink:href="#__RefHeading___Toc1594_3088266502" office:name="7.5. Música y sonido" text:style-name="Index_20_Link" text:visited-style-name="Index_20_Link">7.5. Música y sonido<text:tab/>11</text:a></text:p>
          <text:p text:style-name="P6"><text:a xlink:type="simple" xlink:href="#__RefHeading___Toc1596_3088266502" office:name="7.6. Diseño visual de personajes / campeones (Gabriel Celis)" text:style-name="Index_20_Link" text:visited-style-name="Index_20_Link"><text:soft-page-break/>7.6. Diseño visual de personajes / campeones (Gabriel Celis)<text:tab/>11</text:a></text:p>
          <text:p text:style-name="P6"><text:a xlink:type="simple" xlink:href="#__RefHeading___Toc1598_3088266502" office:name="7.7. Evolución del juego (capturas)" text:style-name="Index_20_Link" text:visited-style-name="Index_20_Link">7.7. Evolución del juego (capturas)<text:tab/>12</text:a></text:p>
          <text:p text:style-name="P5"><text:a xlink:type="simple" xlink:href="#__RefHeading___Toc1600_3088266502" office:name="8. Manual básico de utilización" text:style-name="Index_20_Link" text:visited-style-name="Index_20_Link">8. Manual básico de utilización<text:tab/>17</text:a></text:p>
          <text:p text:style-name="P6"><text:a xlink:type="simple" xlink:href="#__RefHeading___Toc1602_3088266502" office:name="8.1. Requisitos" text:style-name="Index_20_Link" text:visited-style-name="Index_20_Link">8.1. Requisitos<text:tab/>17</text:a></text:p>
          <text:p text:style-name="P6"><text:a xlink:type="simple" xlink:href="#__RefHeading___Toc1604_3088266502" office:name="8.2. Instalación" text:style-name="Index_20_Link" text:visited-style-name="Index_20_Link">8.2. Instalación<text:tab/>17</text:a></text:p>
          <text:p text:style-name="P6"><text:a xlink:type="simple" xlink:href="#__RefHeading___Toc1606_3088266502" office:name="8.3. Ejecutar el juego" text:style-name="Index_20_Link" text:visited-style-name="Index_20_Link">8.3. Ejecutar el juego<text:tab/>17</text:a></text:p>
          <text:p text:style-name="P6"><text:a xlink:type="simple" xlink:href="#__RefHeading___Toc1608_3088266502" office:name="8.4. Menú y modos de juego" text:style-name="Index_20_Link" text:visited-style-name="Index_20_Link">8.4. Menú y modos de juego<text:tab/>17</text:a></text:p>
          <text:p text:style-name="P6"><text:a xlink:type="simple" xlink:href="#__RefHeading___Toc1610_3088266502" office:name="8.5. Multijugador LAN — incidencias frecuentes" text:style-name="Index_20_Link" text:visited-style-name="Index_20_Link">8.5. Multijugador LAN — incidencias frecuentes<text:tab/>17</text:a></text:p>
          <text:p text:style-name="P5"><text:a xlink:type="simple" xlink:href="#__RefHeading___Toc1612_3088266502" office:name="9. Dificultades encontradas" text:style-name="Index_20_Link" text:visited-style-name="Index_20_Link">9. Dificultades encontradas<text:tab/>18</text:a></text:p>
          <text:p text:style-name="P6"><text:a xlink:type="simple" xlink:href="#__RefHeading___Toc1614_3088266502" office:name="Aprender a usar GitHub en pareja" text:style-name="Index_20_Link" text:visited-style-name="Index_20_Link">Aprender a usar GitHub en pareja<text:tab/>18</text:a></text:p>
          <text:p text:style-name="P6"><text:a xlink:type="simple" xlink:href="#__RefHeading___Toc1616_3088266502" office:name="Los GIF animados se veían como imágenes fijas" text:style-name="Index_20_Link" text:visited-style-name="Index_20_Link">Los GIF animados se veían como imágenes fijas<text:tab/>18</text:a></text:p>
          <text:p text:style-name="P6"><text:a xlink:type="simple" xlink:href="#__RefHeading___Toc1618_3088266502" office:name="Controles en partida LAN" text:style-name="Index_20_Link" text:visited-style-name="Index_20_Link">Controles en partida LAN<text:tab/>18</text:a></text:p>
          <text:p text:style-name="P6"><text:a xlink:type="simple" xlink:href="#__RefHeading___Toc1620_3088266502" office:name="Movimiento encajado al grid" text:style-name="Index_20_Link" text:visited-style-name="Index_20_Link">Movimiento encajado al grid<text:tab/>18</text:a></text:p>
          <text:p text:style-name="P6"><text:a xlink:type="simple" xlink:href="#__RefHeading___Toc1622_3088266502" office:name="Diseño gráfico y audio" text:style-name="Index_20_Link" text:visited-style-name="Index_20_Link">Diseño gráfico y audio<text:tab/>18</text:a></text:p>
          <text:p text:style-name="P5"><text:a xlink:type="simple" xlink:href="#__RefHeading___Toc1624_3088266502" office:name="10. Conclusiones" text:style-name="Index_20_Link" text:visited-style-name="Index_20_Link">10. Conclusiones<text:tab/>18</text:a></text:p>
          <text:p text:style-name="P6"><text:a xlink:type="simple" xlink:href="#__RefHeading___Toc1626_3088266502" office:name="Miguel Marcano (programación y arquitectura)" text:style-name="Index_20_Link" text:visited-style-name="Index_20_Link">Miguel Marcano (programación y arquitectura)<text:tab/>18</text:a></text:p>
          <text:p text:style-name="P6"><text:a xlink:type="simple" xlink:href="#__RefHeading___Toc1628_3088266502" office:name="Gabriel Celis (diseño gráfico, audio y personajes)" text:style-name="Index_20_Link" text:visited-style-name="Index_20_Link">Gabriel Celis (diseño gráfico, audio y personajes)<text:tab/>19</text:a></text:p>
          <text:p text:style-name="P6"><text:a xlink:type="simple" xlink:href="#__RefHeading___Toc1630_3088266502" office:name="Conclusión conjunta" text:style-name="Index_20_Link" text:visited-style-name="Index_20_Link">Conclusión conjunta<text:tab/>19</text:a></text:p>
          <text:p text:style-name="P5"><text:a xlink:type="simple" xlink:href="#__RefHeading___Toc1632_3088266502" office:name="11. Posibles mejoras" text:style-name="Index_20_Link" text:visited-style-name="Index_20_Link">11. Posibles mejoras<text:tab/>19</text:a></text:p>
          <text:p text:style-name="P5"><text:a xlink:type="simple" xlink:href="#__RefHeading___Toc1634_3088266502" office:name="12. Fuentes de información y webgrafía" text:style-name="Index_20_Link" text:visited-style-name="Index_20_Link">12. Fuentes de información y webgrafía<text:tab/>19</text:a></text:p>
        </text:index-body>
      </text:table-of-content>
      <text:p text:style-name="P4"/>
      <text:p text:style-name="P1"/>
      <text:h text:style-name="P8" text:outline-level="1"><text:bookmark-start text:name="__RefHeading___Toc1554_3088266502"/><text:span text:style-name="T6">3. Descripción general del proyecto</text:span><text:bookmark-end text:name="__RefHeading___Toc1554_3088266502"/></text:h>
      <text:p text:style-name="P9"><text:span text:style-name="T3">Bomb Champions es un videojuego para ordenador inspirado en el clásico Bomberman. Dos o más jugadores se mueven por un laberinto, colocan bombas para romper bloques e intentan eliminar a los demás. El último jugador en pie gana la partida.</text:span></text:p>
      <text:p text:style-name="P9"><text:span text:style-name="T3">La idea principal del proyecto no es solo copiar un juego antiguo, sino añadir personajes distintos, los campeones, que el jugador elige antes de empezar. Cada campeón puede tener velocidad, número de bombas o una habilidad especial diferente. En el Bomberman original todos los personajes son iguales, aquí la elección importa.</text:span></text:p>
      <text:p text:style-name="P9"><text:span text:style-name="T3">El juego se ha programado en Python con la librería de Pygame, de modo que funciona en cualquier ordenador con tal de instalar python. También incluye partidas en red local (LAN) entre varios ordenadores, incluyendo así el módulo de Redes.</text:span></text:p>
      <text:p text:style-name="P9"><text:span text:style-name="T3">El producto está en fase de MVP, que significa producto mínimo viable (Minimum Viable Product): el menú, el mapa, los jugadores, las bombas y el modo </text:span><text:span text:style-name="T7">multijugador</text:span><text:span text:style-name="T3"> por red están implementados. Al desarrollar el juego, se pensó no solo en diseñar lo mínimo para que sea funcional, si no también dejar el terreno preparado para escalarlo, o sea, añadir mas mejoras a futuro.</text:span></text:p>
      <text:h text:style-name="P10" text:outline-level="1"><text:bookmark-start text:name="__RefHeading___Toc1556_3088266502"/><text:span text:style-name="T6">4. Objetivos</text:span><text:bookmark-end text:name="__RefHeading___Toc1556_3088266502"/></text:h>
      <text:h text:style-name="P11" text:outline-level="2"><text:bookmark-start text:name="__RefHeading___Toc1558_3088266502"/><text:span text:style-name="T6">4.1. Objetivos generales</text:span><text:bookmark-end text:name="__RefHeading___Toc1558_3088266502"/></text:h>
      <text:list xml:id="list2073853003" text:style-name="WWNum1">
        <text:list-item>
          <text:p text:style-name="P12"><text:span text:style-name="T8">Desarrollar un videojuego funcional Pygame, aplicando programación orientada a objetos.</text:span></text:p>
        </text:list-item>
        <text:list-item>
          <text:p text:style-name="P12"><text:span text:style-name="T8">Integrar conocimientos de redes (cliente-servidor, sockets) para partidas multijugador en LAN.</text:span></text:p>
        </text:list-item>
        <text:list-item>
          <text:p text:style-name="P12"><text:span text:style-name="T8">Diseñar los assets: Imágenes, sprites, musica y arte del juego.</text:span></text:p>
        </text:list-item>
      </text:list>
      <text:h text:style-name="P11" text:outline-level="2"><text:bookmark-start text:name="__RefHeading___Toc1560_3088266502"/><text:span text:style-name="T6">4.2. Objetivos específicos</text:span><text:bookmark-end text:name="__RefHeading___Toc1560_3088266502"/></text:h>
      <table:table table:name="Tabla2" table:style-name="Tabla2">
        <table:table-column table:style-name="Tabla2.A" table:number-columns-repeated="2"/>
        <table:table-row table:style-name="Tabla2.1">
          <table:table-cell table:style-name="Tabla2.A1" office:value-type="string">
            <text:p text:style-name="P13"><text:span text:style-name="T9">Objetivo</text:span></text:p>
          </table:table-cell>
          <table:table-cell table:style-name="Tabla2.A1" office:value-type="string">
            <text:p text:style-name="P13"><text:span text:style-name="T9">Estado</text:span></text:p>
          </table:table-cell>
        </table:table-row>
        <table:table-row table:style-name="Tabla2.1">
          <table:table-cell table:style-name="Tabla2.A1" office:value-type="string">
            <text:p text:style-name="P13"><text:span text:style-name="T10">Estructura modular del código (main, mapa, bomba, campeones, red_*)</text:span></text:p>
          </table:table-cell>
          <table:table-cell table:style-name="Tabla2.A1" office:value-type="string">
            <text:p text:style-name="P13"><text:span text:style-name="T10">Logrado</text:span></text:p>
          </table:table-cell>
        </table:table-row>
        <text:soft-page-break/>
        <table:table-row table:style-name="Tabla2.1">
          <table:table-cell table:style-name="Tabla2.A1" office:value-type="string">
            <text:p text:style-name="P13"><text:span text:style-name="T10">Menú principal y flujo de partida local 2 jugadores</text:span></text:p>
          </table:table-cell>
          <table:table-cell table:style-name="Tabla2.A1" office:value-type="string">
            <text:p text:style-name="P13"><text:span text:style-name="T10">Logrado</text:span></text:p>
          </table:table-cell>
        </table:table-row>
        <table:table-row table:style-name="Tabla2.1">
          <table:table-cell table:style-name="Tabla2.A1" office:value-type="string">
            <text:p text:style-name="P13"><text:span text:style-name="T10">Generación y dibujo del mapa (17×21 celdas)</text:span></text:p>
          </table:table-cell>
          <table:table-cell table:style-name="Tabla2.A1" office:value-type="string">
            <text:p text:style-name="P13"><text:span text:style-name="T10">Logrado</text:span></text:p>
          </table:table-cell>
        </table:table-row>
        <table:table-row table:style-name="Tabla2.1">
          <table:table-cell table:style-name="Tabla2.A1" office:value-type="string">
            <text:p text:style-name="P13"><text:span text:style-name="T10">Sistema de bombas y explosiones</text:span></text:p>
          </table:table-cell>
          <table:table-cell table:style-name="Tabla2.A1" office:value-type="string">
            <text:p text:style-name="P13"><text:span text:style-name="T10">Logrado</text:span></text:p>
          </table:table-cell>
        </table:table-row>
        <table:table-row table:style-name="Tabla2.1">
          <table:table-cell table:style-name="Tabla2.A1" office:value-type="string">
            <text:p text:style-name="P13"><text:span text:style-name="T10">Campeones con parámetros y habilidades especiales</text:span></text:p>
          </table:table-cell>
          <table:table-cell table:style-name="Tabla2.A1" office:value-type="string">
            <text:p text:style-name="P13"><text:span text:style-name="T10">Logrado (en ampliación)</text:span></text:p>
          </table:table-cell>
        </table:table-row>
        <table:table-row table:style-name="Tabla2.1">
          <table:table-cell table:style-name="Tabla2.A1" office:value-type="string">
            <text:p text:style-name="P13"><text:span text:style-name="T10">Multijugador LAN (crear/buscar partida, sincronización)</text:span></text:p>
          </table:table-cell>
          <table:table-cell table:style-name="Tabla2.A1" office:value-type="string">
            <text:p text:style-name="P13"><text:span text:style-name="T10">Implementado</text:span></text:p>
          </table:table-cell>
        </table:table-row>
        <table:table-row table:style-name="Tabla2.1">
          <table:table-cell table:style-name="Tabla2.A1" office:value-type="string">
            <text:p text:style-name="P13"><text:span text:style-name="T10">Assets gráficos y música coherentes con el estilo del juego</text:span></text:p>
          </table:table-cell>
          <table:table-cell table:style-name="Tabla2.A1" office:value-type="string">
            <text:p text:style-name="P13"><text:span text:style-name="T10">Logrado </text:span></text:p>
          </table:table-cell>
        </table:table-row>
        <table:table-row table:style-name="Tabla2.1">
          <table:table-cell table:style-name="Tabla2.A1" office:value-type="string">
            <text:p text:style-name="P13"><text:span text:style-name="T10">Documentar decisiones técnicas y manual de usuario</text:span></text:p>
          </table:table-cell>
          <table:table-cell table:style-name="Tabla2.A1" office:value-type="string">
            <text:p text:style-name="P14"><text:span text:style-name="T10">Logrado</text:span></text:p>
          </table:table-cell>
        </table:table-row>
      </table:table>
      <text:p text:style-name="P1"/>
      <text:h text:style-name="P10" text:outline-level="1"><text:bookmark-start text:name="__RefHeading___Toc1562_3088266502"/><text:span text:style-name="T6">5. Justificación de la opción elegida</text:span><text:bookmark-end text:name="__RefHeading___Toc1562_3088266502"/></text:h>
      <text:p text:style-name="P9"><text:span text:style-name="T3">Se ha elegido trabajar con Python, Pygame, PyCharm, Piskel y BeepBox por las razones siguientes:</text:span></text:p>
      <text:list xml:id="list1897166772" text:style-name="WWNum5">
        <text:list-item>
          <text:p text:style-name="P15"><text:span text:style-name="T8">El ciclo SMR incluye programación en Python y fundamentos de redes; el proyecto demuestra ambos.</text:span></text:p>
        </text:list-item>
        <text:list-item>
          <text:p text:style-name="P15"><text:span text:style-name="T8">Python, Pygame, PyCharm Community, Piskel y BeepBox no requieren licencias de pago, se pueden usar gratuitamente.</text:span></text:p>
        </text:list-item>
        <text:list-item>
          <text:p text:style-name="P15"><text:span text:style-name="T8">Piskel encaja con el estilo retro del juego, es fácil crear los sprites pixelados que usamos en el proyecto.</text:span></text:p>
        </text:list-item>
        <text:list-item>
          <text:p text:style-name="P15"><text:span text:style-name="T8">BeepBox es una herramienta en linea que facilita mucho la creación de musica para el juego. Se enfoca en un estilo retro.</text:span></text:p>
        </text:list-item>
        <text:list-item>
          <text:p text:style-name="P15"><text:span text:style-name="T8">Multijugador LAN: Implementación básica de redes. Se necesita conocimiento de IPs, Firewall, sockets, puertos, y demás para que funcione el juego.</text:span></text:p>
        </text:list-item>
      </text:list>
      <text:h text:style-name="P11" text:outline-level="2"><text:bookmark-start text:name="__RefHeading___Toc1564_3088266502"/><text:span text:style-name="T6">5.1. Uso de inteligencia artificial en el desarrollo</text:span><text:bookmark-end text:name="__RefHeading___Toc1564_3088266502"/></text:h>
      <text:p text:style-name="P9"><text:span text:style-name="T3">El uso de herramientas de inteligencia artificial (asistentes de código, asistencia para solucionar errores y bugs, ayuda con el diseño de musica.) forma parte deliberada del proyecto y se justifica en dos ámbitos: formativo y profesional.</text:span></text:p>
      <text:h text:style-name="P16" text:outline-level="3"><text:bookmark-start text:name="__RefHeading___Toc1566_3088266502"/><text:soft-page-break/><text:span text:style-name="T6">Justificación formativa</text:span><text:bookmark-end text:name="__RefHeading___Toc1566_3088266502"/></text:h>
      <text:p text:style-name="P9"><text:span text:style-name="T3">En el instituto ya trabajamos con Python, pero Pygame y las redes con sockets eran cosas nuevas para el equipo. La IA nos ha servido como apoyo cuando nos atascábamos: por ejemplo, entender un error de Pygame, ver cómo organizar el envío de datos por TCP o probar una idea antes de meterla en el código definitivo.</text:span></text:p>
      <text:p text:style-name="P9"><text:span text:style-name="T3">Eso no significa copiar y pegar sin más. Siempre revisamos lo que sale, lo probamos en el juego y lo adaptamos a nuestros archivos (main.py, red_partida.py, etc.). Así hemos aprendido más rápido que leyendo solo documentación, porque veíamos el problema concreto de nuestro proyecto y no un ejemplo genérico.</text:span></text:p>
      <text:p text:style-name="P9"><text:span text:style-name="T3">También nos ha ayudado a redactar borradores de esta memoria y a ordenar ideas para la exposición, pero el contenido final lo escribimos y comprobamos nosotros, sobre todo lo que describe lo que el juego hace de verdad.</text:span></text:p>
      <text:h text:style-name="P16" text:outline-level="3"><text:bookmark-start text:name="__RefHeading___Toc1568_3088266502"/><text:span text:style-name="T6">Contexto del mercado laboral</text:span><text:bookmark-end text:name="__RefHeading___Toc1568_3088266502"/></text:h>
      <text:p text:style-name="P9"><text:span text:style-name="T3">Las ofertas de empleo para desarrollador de software, técnico de sistemas y perfiles junior en informática mencionan con frecuencia competencias como:</text:span></text:p>
      <text:list text:continue-list="list2073853003" text:style-name="WWNum1">
        <text:list-item>
          <text:p text:style-name="P12"><text:span text:style-name="T8">Productividad con asistentes de IA en el IDE.</text:span></text:p>
        </text:list-item>
        <text:list-item>
          <text:p text:style-name="P12"><text:span text:style-name="T8">Capacidad de revisar y validar código generado o sugerido.</text:span></text:p>
        </text:list-item>
        <text:list-item>
          <text:p text:style-name="P12"><text:span text:style-name="T8">Documentación y pruebas apoyadas en herramientas actuales.</text:span></text:p>
        </text:list-item>
      </text:list>
      <text:p text:style-name="P9"><text:span text:style-name="T3">Un programador que rechaza por completo el uso de IA en el flujo de trabajo puede resultar menos competitivo frente a quien la utiliza con criterio: no para sustituir el pensamiento, sino para acelerar tareas repetitivas, explorar APIs desconocidas (PyGame) y ayuda en la solucion de errores.</text:span></text:p>
      <text:p text:style-name="P9"><text:span text:style-name="T3">En el sector la IA no sustituye al desarrollador: amplía su alcance. La habilidad valorada es saber qué pedir, comprobar el resultado y asumir la responsabilidad del código y la documentación entregados.</text:span></text:p>
      <text:h text:style-name="P16" text:outline-level="3"><text:soft-page-break/><text:span text:style-name="T3"/></text:h>
      <text:h text:style-name="P10" text:outline-level="1"><text:bookmark-start text:name="__RefHeading___Toc1570_3088266502"/><text:span text:style-name="T6">6. Recursos necesarios</text:span><text:bookmark-end text:name="__RefHeading___Toc1570_3088266502"/></text:h>
      <text:h text:style-name="P11" text:outline-level="2"><text:bookmark-start text:name="__RefHeading___Toc1572_3088266502"/><text:span text:style-name="T6">6.1. Hardware</text:span><text:bookmark-end text:name="__RefHeading___Toc1572_3088266502"/></text:h>
      <text:list text:continue-numbering="true" text:style-name="WWNum1">
        <text:list-item>
          <text:p text:style-name="P12"><text:span text:style-name="T8">Dos ordenadores portátiles o de sobremesa (uno por integrante del equipo).</text:span></text:p>
        </text:list-item>
        <text:list-item>
          <text:p text:style-name="P12"><text:span text:style-name="T8">Red local Wi‑Fi o cableada para el multijugador LAN.</text:span></text:p>
        </text:list-item>
      </text:list>
      <text:h text:style-name="P11" text:outline-level="2"><text:bookmark-start text:name="__RefHeading___Toc1574_3088266502"/><text:span text:style-name="T6">6.2. Software</text:span><text:bookmark-end text:name="__RefHeading___Toc1574_3088266502"/></text:h>
      <table:table table:name="Tabla3" table:style-name="Tabla3">
        <table:table-column table:style-name="Tabla3.A" table:number-columns-repeated="2"/>
        <table:table-row table:style-name="Tabla3.1">
          <table:table-cell table:style-name="Tabla3.A1" office:value-type="string">
            <text:p text:style-name="P13"><text:span text:style-name="T9">Herramienta</text:span></text:p>
          </table:table-cell>
          <table:table-cell table:style-name="Tabla3.A1" office:value-type="string">
            <text:p text:style-name="P13"><text:span text:style-name="T9">Uso</text:span></text:p>
          </table:table-cell>
        </table:table-row>
        <table:table-row table:style-name="Tabla3.1">
          <table:table-cell table:style-name="Tabla3.A1" office:value-type="string">
            <text:p text:style-name="P13"><text:span text:style-name="T10">Python</text:span></text:p>
          </table:table-cell>
          <table:table-cell table:style-name="Tabla3.A1" office:value-type="string">
            <text:p text:style-name="P13"><text:span text:style-name="T10">Lenguaje principal</text:span></text:p>
          </table:table-cell>
        </table:table-row>
        <table:table-row table:style-name="Tabla3.1">
          <table:table-cell table:style-name="Tabla3.A1" office:value-type="string">
            <text:p text:style-name="P13"><text:span text:style-name="T10">Pygame</text:span></text:p>
          </table:table-cell>
          <table:table-cell table:style-name="Tabla3.A1" office:value-type="string">
            <text:p text:style-name="P13"><text:span text:style-name="T10">Ventana, sprites, eventos, sonido básico</text:span></text:p>
          </table:table-cell>
        </table:table-row>
        <table:table-row table:style-name="Tabla3.1">
          <table:table-cell table:style-name="Tabla3.A1" office:value-type="string">
            <text:p text:style-name="P13"><text:span text:style-name="T10">PyCharm</text:span></text:p>
          </table:table-cell>
          <table:table-cell table:style-name="Tabla3.A1" office:value-type="string">
            <text:p text:style-name="P13"><text:span text:style-name="T10">IDE: edición, depuración, entorno virtual</text:span></text:p>
          </table:table-cell>
        </table:table-row>
        <table:table-row table:style-name="Tabla3.1">
          <table:table-cell table:style-name="Tabla3.A1" office:value-type="string">
            <text:p text:style-name="P13"><text:span text:style-name="T10">Git</text:span></text:p>
          </table:table-cell>
          <table:table-cell table:style-name="Tabla3.A1" office:value-type="string">
            <text:p text:style-name="P13"><text:span text:style-name="T10">Control de versiones del repositorio del proyecto</text:span></text:p>
          </table:table-cell>
        </table:table-row>
        <table:table-row table:style-name="Tabla3.1">
          <table:table-cell table:style-name="Tabla3.A1" office:value-type="string">
            <text:p text:style-name="P13"><text:span text:style-name="T10">Piskel</text:span></text:p>
          </table:table-cell>
          <table:table-cell table:style-name="Tabla3.A1" office:value-type="string">
            <text:p text:style-name="P13"><text:span text:style-name="T10">Sprites pixel art</text:span></text:p>
          </table:table-cell>
        </table:table-row>
        <table:table-row table:style-name="Tabla3.1">
          <table:table-cell table:style-name="Tabla3.A1" office:value-type="string">
            <text:p text:style-name="P13"><text:span text:style-name="T10">BeepBox</text:span></text:p>
          </table:table-cell>
          <table:table-cell table:style-name="Tabla3.A1" office:value-type="string">
            <text:p text:style-name="P13"><text:span text:style-name="T10">Música y efectos en estilo retro</text:span></text:p>
          </table:table-cell>
        </table:table-row>
      </table:table>
      <text:p text:style-name="P1"/>
      <text:h text:style-name="P11" text:outline-level="2"><text:bookmark-start text:name="__RefHeading___Toc1576_3088266502"/><text:span text:style-name="T6">6.3. Servicios en línea</text:span><text:bookmark-end text:name="__RefHeading___Toc1576_3088266502"/></text:h>
      <text:list xml:id="list234823187764524" text:continue-numbering="true" text:style-name="WWNum1">
        <text:list-item>
          <text:p text:style-name="P12"><text:span text:style-name="T8">Repositorio del código en Github.</text:span></text:p>
        </text:list-item>
      </text:list>
      <text:h text:style-name="P10" text:outline-level="1"><text:bookmark-start text:name="__RefHeading___Toc1578_3088266502"/><text:span text:style-name="T6">7. Desarrollo del proyecto</text:span><text:bookmark-end text:name="__RefHeading___Toc1578_3088266502"/></text:h>
      <text:h text:style-name="P11" text:outline-level="2"><text:bookmark-start text:name="__RefHeading___Toc1580_3088266502"/><text:span text:style-name="T6">7.1. Metodología y fases</text:span><text:bookmark-end text:name="__RefHeading___Toc1580_3088266502"/></text:h>
      <text:list text:style-name="L1">
        <text:list-item>
          <text:p text:style-name="P17"><text:span text:style-name="T8">Planificación: Idea del juego, mecánicas, reparto Miguel / Gabriel.</text:span></text:p>
        </text:list-item>
        <text:list-item>
          <text:p text:style-name="P17"><text:span text:style-name="T8">Diseño de estructura: Módulos Python, que sea facil de ver que elementos controla cada archivo, constantes en configuracion.py.</text:span></text:p>
        </text:list-item>
        <text:list-item>
          <text:p text:style-name="P17"><text:span text:style-name="T8">Programación principal: Mapa, jugadores, bombas, menús.</text:span></text:p>
        </text:list-item>
        <text:list-item>
          <text:p text:style-name="P17"><text:span text:style-name="T8">Multijugador: Descubrimiento UDP y partida TCP (red_descubrimiento.py, red_partida.py).</text:span></text:p>
        </text:list-item>
        <text:list-item>
          <text:p text:style-name="P17"><text:span text:style-name="T8">Gráficos y sonido: Assets en assets/ (responsabilidad principal de Gabriel).</text:span></text:p>
        </text:list-item>
        <text:list-item>
          <text:p text:style-name="P17"><text:soft-page-break/><text:span text:style-name="T8">Integración y pruebas: Partidas locales y en LAN, corrección de bugs.</text:span></text:p>
        </text:list-item>
        <text:list-item>
          <text:p text:style-name="P17"><text:span text:style-name="T8">Documentación y presentación: Realizar la Memoria (este documento) y presentacion en Canva.</text:span></text:p>
        </text:list-item>
      </text:list>
      <text:h text:style-name="P11" text:outline-level="2"><text:bookmark-start text:name="__RefHeading___Toc1582_3088266502"/><text:span text:style-name="T6">7.2. Arquitectura del software</text:span><text:bookmark-end text:name="__RefHeading___Toc1582_3088266502"/></text:h>
      <text:p text:style-name="P18"><text:span text:style-name="T11">main.py</text:span></text:p>
      <text:p text:style-name="P18"><text:span text:style-name="T11"><text:s text:c="2"/>├── configuracion.py <text:s text:c="3"/>(constantes, teclas, red)</text:span></text:p>
      <text:p text:style-name="P18"><text:span text:style-name="T11"><text:s text:c="2"/>├── mapa.py <text:s text:c="12"/>(clase Mapa: grilla y dibujo)</text:span></text:p>
      <text:p text:style-name="P18"><text:span text:style-name="T11"><text:s text:c="2"/>├── bomba.py <text:s text:c="11"/>(Bomba, GestorBombas)</text:span></text:p>
      <text:p text:style-name="P18"><text:span text:style-name="T11"><text:s text:c="2"/>├── campeones.py <text:s text:c="7"/>(definición de campeones, clase Jugador)</text:span></text:p>
      <text:p text:style-name="P18"><text:span text:style-name="T11"><text:s text:c="2"/>├── especiales.py <text:s text:c="6"/>(habilidades, p. ej. cuchillo)</text:span></text:p>
      <text:p text:style-name="P18"><text:span text:style-name="T11"><text:s text:c="2"/>├── red_descubrimiento.py <text:s/>(anuncio/búsqueda UDP)</text:span></text:p>
      <text:p text:style-name="P18"><text:span text:style-name="T11"><text:s text:c="2"/>└── red_partida.py <text:s text:c="8"/>(host/cliente TCP)</text:span></text:p>
      <text:p text:style-name="P9"><text:span text:style-name="T3">Estructura de carpetas del repositorio:</text:span></text:p>
      <text:p text:style-name="P18"><text:span text:style-name="T11">BombChampions/</text:span></text:p>
      <text:p text:style-name="P18"><text:span text:style-name="T11"><text:s text:c="2"/>main.py, configuracion.py, mapa.py, bomba.py</text:span></text:p>
      <text:p text:style-name="P18"><text:span text:style-name="T11"><text:s text:c="2"/>campeones.py, especiales.py, red_descubrimiento.py, red_partida.py</text:span></text:p>
      <text:p text:style-name="P18"><text:span text:style-name="T11"><text:s text:c="2"/>assets/ <text:s text:c="9"/># imágenes y .piskel</text:span></text:p>
      <text:p text:style-name="P18"><text:span text:style-name="T11"><text:s text:c="2"/>ejecutar.bat <text:s text:c="4"/># lanzador Windows</text:span></text:p>
      <text:p text:style-name="P18"><text:span text:style-name="T11"><text:s text:c="2"/>requirements.txt</text:span></text:p>
      <text:h text:style-name="P11" text:outline-level="2"><text:bookmark-start text:name="__RefHeading___Toc1584_3088266502"/><text:span text:style-name="T6">7.3. Desarrollo técnico</text:span><text:bookmark-end text:name="__RefHeading___Toc1584_3088266502"/></text:h>
      <text:h text:style-name="P16" text:outline-level="3"><text:bookmark-start text:name="__RefHeading___Toc1586_3088266502"/><text:span text:style-name="T6">Implementado</text:span><text:bookmark-end text:name="__RefHeading___Toc1586_3088266502"/></text:h>
      <table:table table:name="Tabla4" table:style-name="Tabla4">
        <table:table-column table:style-name="Tabla4.A" table:number-columns-repeated="2"/>
        <table:table-row table:style-name="Tabla4.1">
          <table:table-cell table:style-name="Tabla4.A1" office:value-type="string">
            <text:p text:style-name="P13"><text:span text:style-name="T9">Componente</text:span></text:p>
          </table:table-cell>
          <table:table-cell table:style-name="Tabla4.A1" office:value-type="string">
            <text:p text:style-name="P13"><text:span text:style-name="T9">Descripción breve</text:span></text:p>
          </table:table-cell>
        </table:table-row>
        <table:table-row table:style-name="Tabla4.1">
          <table:table-cell table:style-name="Tabla4.A1" office:value-type="string">
            <text:p text:style-name="P13"><text:span text:style-name="T10">Menú principal</text:span></text:p>
          </table:table-cell>
          <table:table-cell table:style-name="Tabla4.A1" office:value-type="string">
            <text:p text:style-name="P13"><text:span text:style-name="T10">Título, botones: partida local, crear partida, buscar partidas, salir.</text:span></text:p>
          </table:table-cell>
        </table:table-row>
        <table:table-row table:style-name="Tabla4.1">
          <table:table-cell table:style-name="Tabla4.A1" office:value-type="string">
            <text:p text:style-name="P13"><text:span text:style-name="T10">Mapa</text:span></text:p>
          </table:table-cell>
          <table:table-cell table:style-name="Tabla4.A1" office:value-type="string">
            <text:p text:style-name="P13"><text:span text:style-name="T10">Grilla 17×21; suelo (0), pared fija (1), caja </text:span><text:soft-page-break/><text:span text:style-name="T10">destructible (2).</text:span></text:p>
          </table:table-cell>
        </table:table-row>
        <table:table-row table:style-name="Tabla4.1">
          <table:table-cell table:style-name="Tabla4.A1" office:value-type="string">
            <text:p text:style-name="P13"><text:span text:style-name="T10">Jugador</text:span></text:p>
          </table:table-cell>
          <table:table-cell table:style-name="Tabla4.A1" office:value-type="string">
            <text:p text:style-name="P13"><text:span text:style-name="T10">Movimiento por cuadrícula, colisiones, elección de campeón, sprites.</text:span></text:p>
          </table:table-cell>
        </table:table-row>
        <table:table-row table:style-name="Tabla4.1">
          <table:table-cell table:style-name="Tabla4.A1" office:value-type="string">
            <text:p text:style-name="P13"><text:span text:style-name="T10">Bombas</text:span></text:p>
          </table:table-cell>
          <table:table-cell table:style-name="Tabla4.A1" office:value-type="string">
            <text:p text:style-name="P13"><text:span text:style-name="T10">Colocación, temporizador, explosión en cruz, destrucción de cajas.</text:span></text:p>
          </table:table-cell>
        </table:table-row>
        <table:table-row table:style-name="Tabla4.1">
          <table:table-cell table:style-name="Tabla4.A1" office:value-type="string">
            <text:p text:style-name="P13"><text:span text:style-name="T10">Campeones</text:span></text:p>
          </table:table-cell>
          <table:table-cell table:style-name="Tabla4.A1" office:value-type="string">
            <text:p text:style-name="P13"><text:span text:style-name="T10">Azul, Rojo, Amarillo y CuchillasPJ (especial cuchillo).</text:span></text:p>
          </table:table-cell>
        </table:table-row>
        <table:table-row table:style-name="Tabla4.1">
          <table:table-cell table:style-name="Tabla4.A1" office:value-type="string">
            <text:p text:style-name="P13"><text:span text:style-name="T10">Partida local</text:span></text:p>
          </table:table-cell>
          <table:table-cell table:style-name="Tabla4.A1" office:value-type="string">
            <text:p text:style-name="P13"><text:span text:style-name="T10">Dos jugadores en el mismo PC (flechas + WASD).</text:span></text:p>
          </table:table-cell>
        </table:table-row>
        <table:table-row table:style-name="Tabla4.1">
          <table:table-cell table:style-name="Tabla4.A1" office:value-type="string">
            <text:p text:style-name="P13"><text:span text:style-name="T10">Red LAN</text:span></text:p>
          </table:table-cell>
          <table:table-cell table:style-name="Tabla4.A1" office:value-type="string">
            <text:p text:style-name="P13"><text:span text:style-name="T10">Host anuncia partida; clientes se unen; sincronización desde el host.</text:span></text:p>
          </table:table-cell>
        </table:table-row>
      </table:table>
      <text:p text:style-name="P1"/>
      <text:h text:style-name="P16" text:outline-level="3"><text:bookmark-start text:name="__RefHeading___Toc1588_3088266502"/><text:span text:style-name="T6">Mapa — tipos de celda</text:span><text:bookmark-end text:name="__RefHeading___Toc1588_3088266502"/></text:h>
      <table:table table:name="Tabla5" table:style-name="Tabla5">
        <table:table-column table:style-name="Tabla5.A" table:number-columns-repeated="3"/>
        <table:table-row table:style-name="Tabla5.1">
          <table:table-cell table:style-name="Tabla5.A1" office:value-type="string">
            <text:p text:style-name="P13"><text:span text:style-name="T9">Valor</text:span></text:p>
          </table:table-cell>
          <table:table-cell table:style-name="Tabla5.A1" office:value-type="string">
            <text:p text:style-name="P13"><text:span text:style-name="T9">Significado</text:span></text:p>
          </table:table-cell>
          <table:table-cell table:style-name="Tabla5.A1" office:value-type="string">
            <text:p text:style-name="P13"><text:span text:style-name="T9">Asset</text:span></text:p>
          </table:table-cell>
        </table:table-row>
        <table:table-row table:style-name="Tabla5.1">
          <table:table-cell table:style-name="Tabla5.A1" office:value-type="string">
            <text:p text:style-name="P13"><text:span text:style-name="T10">0</text:span></text:p>
          </table:table-cell>
          <table:table-cell table:style-name="Tabla5.A1" office:value-type="string">
            <text:p text:style-name="P13"><text:span text:style-name="T10">Suelo transitable</text:span></text:p>
          </table:table-cell>
          <table:table-cell table:style-name="Tabla5.A1" office:value-type="string">
            <text:p text:style-name="P13"><text:span text:style-name="T10">Pasto.png</text:span></text:p>
          </table:table-cell>
        </table:table-row>
        <table:table-row table:style-name="Tabla5.1">
          <table:table-cell table:style-name="Tabla5.A1" office:value-type="string">
            <text:p text:style-name="P13"><text:span text:style-name="T10">1</text:span></text:p>
          </table:table-cell>
          <table:table-cell table:style-name="Tabla5.A1" office:value-type="string">
            <text:p text:style-name="P13"><text:span text:style-name="T10">Pared indestructible</text:span></text:p>
          </table:table-cell>
          <table:table-cell table:style-name="Tabla5.A1" office:value-type="string">
            <text:p text:style-name="P13"><text:span text:style-name="T10">ParedHierro.gif</text:span></text:p>
          </table:table-cell>
        </table:table-row>
        <table:table-row table:style-name="Tabla5.1">
          <table:table-cell table:style-name="Tabla5.A1" office:value-type="string">
            <text:p text:style-name="P13"><text:span text:style-name="T10">2</text:span></text:p>
          </table:table-cell>
          <table:table-cell table:style-name="Tabla5.A1" office:value-type="string">
            <text:p text:style-name="P13"><text:span text:style-name="T10">Caja destructible</text:span></text:p>
          </table:table-cell>
          <table:table-cell table:style-name="Tabla5.A1" office:value-type="string">
            <text:p text:style-name="P13"><text:span text:style-name="T10">ParedLadrillos.png</text:span></text:p>
          </table:table-cell>
        </table:table-row>
      </table:table>
      <text:p text:style-name="P1"/>
      <text:h text:style-name="P16" text:outline-level="3"><text:bookmark-start text:name="__RefHeading___Toc1590_3088266502"/><text:span text:style-name="T6">Controles (partida local)</text:span><text:bookmark-end text:name="__RefHeading___Toc1590_3088266502"/></text:h>
      <table:table table:name="Tabla6" table:style-name="Tabla6">
        <table:table-column table:style-name="Tabla6.A" table:number-columns-repeated="4"/>
        <table:table-row table:style-name="Tabla6.1">
          <table:table-cell table:style-name="Tabla6.A1" office:value-type="string">
            <text:p text:style-name="P13"><text:span text:style-name="T9">Jugador</text:span></text:p>
          </table:table-cell>
          <table:table-cell table:style-name="Tabla6.A1" office:value-type="string">
            <text:p text:style-name="P13"><text:span text:style-name="T9">Movimiento</text:span></text:p>
          </table:table-cell>
          <table:table-cell table:style-name="Tabla6.A1" office:value-type="string">
            <text:p text:style-name="P13"><text:span text:style-name="T9">Bomba</text:span></text:p>
          </table:table-cell>
          <table:table-cell table:style-name="Tabla6.A1" office:value-type="string">
            <text:p text:style-name="P13"><text:span text:style-name="T9">Especial</text:span></text:p>
          </table:table-cell>
        </table:table-row>
        <table:table-row table:style-name="Tabla6.1">
          <table:table-cell table:style-name="Tabla6.A1" office:value-type="string">
            <text:p text:style-name="P13"><text:span text:style-name="T10">1</text:span></text:p>
          </table:table-cell>
          <table:table-cell table:style-name="Tabla6.A1" office:value-type="string">
            <text:p text:style-name="P13"><text:span text:style-name="T10">Flechas</text:span></text:p>
          </table:table-cell>
          <table:table-cell table:style-name="Tabla6.A1" office:value-type="string">
            <text:p text:style-name="P13"><text:span text:style-name="T10">Espacio</text:span></text:p>
          </table:table-cell>
          <table:table-cell table:style-name="Tabla6.A1" office:value-type="string">
            <text:p text:style-name="P13"><text:span text:style-name="T10">Mayús izquierdo</text:span></text:p>
          </table:table-cell>
        </table:table-row>
        <table:table-row table:style-name="Tabla6.1">
          <table:table-cell table:style-name="Tabla6.A1" office:value-type="string">
            <text:p text:style-name="P13"><text:span text:style-name="T10">2</text:span></text:p>
          </table:table-cell>
          <table:table-cell table:style-name="Tabla6.A1" office:value-type="string">
            <text:p text:style-name="P13"><text:span text:style-name="T10">WASD</text:span></text:p>
          </table:table-cell>
          <table:table-cell table:style-name="Tabla6.A1" office:value-type="string">
            <text:p text:style-name="P13"><text:span text:style-name="T10">E</text:span></text:p>
          </table:table-cell>
          <table:table-cell table:style-name="Tabla6.A1" office:value-type="string">
            <text:p text:style-name="P13"><text:span text:style-name="T10">Q</text:span></text:p>
          </table:table-cell>
        </table:table-row>
      </table:table>
      <text:p text:style-name="P1"/>
      <text:h text:style-name="P11" text:outline-level="2"><text:bookmark-start text:name="__RefHeading___Toc1592_3088266502"/><text:span text:style-name="T6">7.4. Diseño gráfico y assets </text:span><text:bookmark-end text:name="__RefHeading___Toc1592_3088266502"/></text:h>
      <text:p text:style-name="P9"><text:span text:style-name="T3">La herramienta principal ha sido Piskel. Por experiencia es la más fácil de entender.</text:span></text:p>
      <text:p text:style-name="P9"><text:span text:style-name="T3">Se creo cuatro personajes donde lo que más destaca es la vestimenta: para cada uno ha usado una paleta distinta con tonos claros y oscuros de azul, rojo, amarillo y negro. El boceto base no se hizo la IA, se encontró una plantilla en internet y lo que tocaba era cambiar la paleta y hacer que la animación funcionara en Piskel. El tamaño del sprite es 33×45 píxeles para que el personaje entre entero en el lienzo.</text:span></text:p>
      <text:p text:style-name="P9"><text:soft-page-break/><text:span text:style-name="T3">También se encargó del suelo, las paredes de ladrillo (destructibles), los bloques de hierro (indestructibles), la bomba, las explosiones, los corazones y algún item especial.</text:span></text:p>
      <text:p text:style-name="P2"><draw:frame draw:style-name="fr1" draw:name="Picture 2" text:anchor-type="as-char" svg:width="3cm" svg:height="1.023cm" draw:z-index="1"><draw:image xlink:href="Pictures/10000001000000840000002D924FE083.png" xlink:type="simple" xlink:show="embed" xlink:actuate="onLoad" draw:mime-type="image/png"/></draw:frame></text:p>
      <text:p text:style-name="P2"><text:span text:style-name="T1">Figura 2. Ejemplo de sprite de campeón (Guerrero Azul)</text:span></text:p>
      <text:p text:style-name="P1"/>
      <text:p text:style-name="P2"><draw:frame draw:style-name="fr1" draw:name="Picture 3" text:anchor-type="as-char" svg:width="2.499cm" svg:height="2.499cm" draw:z-index="2"><draw:image xlink:href="Pictures/1000000100000020000000202501B3CE.png" xlink:type="simple" xlink:show="embed" xlink:actuate="onLoad" draw:mime-type="image/png"/></draw:frame><draw:frame draw:style-name="fr1" draw:name="Picture 4" text:anchor-type="as-char" svg:width="2.499cm" svg:height="3.53cm" draw:z-index="3"><draw:image xlink:href="Pictures/10000001000000660000009030454A2A.png" xlink:type="simple" xlink:show="embed" xlink:actuate="onLoad" draw:mime-type="image/png"/></draw:frame><draw:frame draw:style-name="fr1" draw:name="Picture 5" text:anchor-type="as-char" svg:width="2.499cm" svg:height="0.529cm" draw:z-index="4"><draw:image xlink:href="Pictures/10000001000000AA00000024088E88CA.png" xlink:type="simple" xlink:show="embed" xlink:actuate="onLoad" draw:mime-type="image/png"/></draw:frame></text:p>
      <text:p text:style-name="P2"><text:span text:style-name="T1">Figura 3. Tiles del mapa, bomba y explosión</text:span></text:p>
      <text:h text:style-name="P11" text:outline-level="2"><text:bookmark-start text:name="__RefHeading___Toc1594_3088266502"/><text:span text:style-name="T6">7.5. Música y sonido</text:span><text:bookmark-end text:name="__RefHeading___Toc1594_3088266502"/></text:h>
      <text:p text:style-name="P9"><text:span text:style-name="T3">Para el audio se ha usado BeepBox. Permite crear instrumentales de forma muy sencilla, en menos de cinco minutos se puede tener algo usable para un juego retro.</text:span></text:p>
      <text:p text:style-name="P9"><text:span text:style-name="T3">Se ha creado los sonidos que el proyecto necesita: instrumental de partida, sonido de la bomba y sonido de la interfaz (menú y botones).</text:span></text:p>
      <text:p text:style-name="P9"><text:span text:style-name="T3">BeepBox es fácil de usar: cada fila de instrumentos lleva un número. Todas las filas marcadas con el mismo número repiten el mismo patrón, si cambias a otro número puedes añadir otra capa sin cortar la primera.</text:span></text:p>
      <text:h text:style-name="P11" text:outline-level="2"><text:bookmark-start text:name="__RefHeading___Toc1596_3088266502"/><text:span text:style-name="T6">7.6. Diseño visual de personajes / campeones (Gabriel Celis)</text:span><text:bookmark-end text:name="__RefHeading___Toc1596_3088266502"/></text:h>
      <table:table table:name="Tabla7" table:style-name="Tabla7">
        <table:table-column table:style-name="Tabla7.A" table:number-columns-repeated="3"/>
        <table:table-row table:style-name="Tabla7.1">
          <table:table-cell table:style-name="Tabla7.A1" office:value-type="string">
            <text:p text:style-name="P13"><text:span text:style-name="T9">Campeón</text:span></text:p>
          </table:table-cell>
          <table:table-cell table:style-name="Tabla7.A1" office:value-type="string">
            <text:p text:style-name="P13"><text:span text:style-name="T9">Prefijo sprite</text:span></text:p>
          </table:table-cell>
          <table:table-cell table:style-name="Tabla7.A1" office:value-type="string">
            <text:p text:style-name="P13"><text:span text:style-name="T9">Detalle visual</text:span></text:p>
          </table:table-cell>
        </table:table-row>
        <table:table-row table:style-name="Tabla7.1">
          <table:table-cell table:style-name="Tabla7.A1" office:value-type="string">
            <text:p text:style-name="P13"><text:span text:style-name="T10">Guerrero Azul</text:span></text:p>
          </table:table-cell>
          <table:table-cell table:style-name="Tabla7.A1" office:value-type="string">
            <text:p text:style-name="P13"><text:span text:style-name="T10">BLUE</text:span></text:p>
          </table:table-cell>
          <table:table-cell table:style-name="Tabla7.A1" office:value-type="string">
            <text:p text:style-name="P13"><text:span text:style-name="T10">Paleta azul claro / oscuro</text:span></text:p>
          </table:table-cell>
        </table:table-row>
        <table:table-row table:style-name="Tabla7.1">
          <table:table-cell table:style-name="Tabla7.A1" office:value-type="string">
            <text:p text:style-name="P13"><text:span text:style-name="T10">Guerrero Rojo</text:span></text:p>
          </table:table-cell>
          <table:table-cell table:style-name="Tabla7.A1" office:value-type="string">
            <text:p text:style-name="P13"><text:span text:style-name="T10">RED</text:span></text:p>
          </table:table-cell>
          <table:table-cell table:style-name="Tabla7.A1" office:value-type="string">
            <text:p text:style-name="P13"><text:span text:style-name="T10">Paleta roja</text:span></text:p>
          </table:table-cell>
        </table:table-row>
        <table:table-row table:style-name="Tabla7.1">
          <table:table-cell table:style-name="Tabla7.A1" office:value-type="string">
            <text:p text:style-name="P13"><text:span text:style-name="T10">Guerrero Amarillo</text:span></text:p>
          </table:table-cell>
          <table:table-cell table:style-name="Tabla7.A1" office:value-type="string">
            <text:p text:style-name="P13"><text:span text:style-name="T10">YELLOW</text:span></text:p>
          </table:table-cell>
          <table:table-cell table:style-name="Tabla7.A1" office:value-type="string">
            <text:p text:style-name="P13"><text:span text:style-name="T10">Paleta amarilla</text:span></text:p>
          </table:table-cell>
        </table:table-row>
        <table:table-row table:style-name="Tabla7.1">
          <table:table-cell table:style-name="Tabla7.A1" office:value-type="string">
            <text:p text:style-name="P13"><text:span text:style-name="T10">CuchillasPJ</text:span></text:p>
          </table:table-cell>
          <table:table-cell table:style-name="Tabla7.A1" office:value-type="string">
            <text:p text:style-name="P13"><text:span text:style-name="T10">CuchillasPJ</text:span></text:p>
          </table:table-cell>
          <table:table-cell table:style-name="Tabla7.A1" office:value-type="string">
            <text:p text:style-name="P13"><text:span text:style-name="T10">Chaqueta negra; habilidad especial</text:span></text:p>
          </table:table-cell>
        </table:table-row>
      </table:table>
      <text:p text:style-name="P1"><text:soft-page-break/></text:p>
      <text:p text:style-name="P9"><text:span text:style-name="T3">La idea del personaje de chaqueta negra y sus habilidades viene de Jett, de Valorant. No es una copia: en Valorant Jett usa kunais; en Bomb Champions CuchillasPJ lanza cuchillos / ondas adaptados al estilo Bomberman.</text:span></text:p>
      <text:h text:style-name="P11" text:outline-level="2"><text:bookmark-start text:name="__RefHeading___Toc1598_3088266502"/><text:span text:style-name="T6">7.7. Evolución del juego (capturas)</text:span><text:bookmark-end text:name="__RefHeading___Toc1598_3088266502"/></text:h>
      <text:p text:style-name="P9"><text:span text:style-name="T3">El juego no salió terminado de golpe. Estas capturas muestran cómo fue mejorando poco a poco.</text:span></text:p>
      <text:p text:style-name="P2"><draw:frame draw:style-name="fr1" draw:name="Picture 6" text:anchor-type="as-char" svg:width="13cm" svg:height="10.222cm" draw:z-index="5"><draw:image xlink:href="Pictures/10000001000003200000027507777E21.png" xlink:type="simple" xlink:show="embed" xlink:actuate="onLoad" draw:mime-type="image/png"/></draw:frame></text:p>
      <text:p text:style-name="P2"><text:span text:style-name="T1">Figura 4. Versión 1 — MVP jugable (sprites estáticos, interfaz básica)</text:span></text:p>
      <text:p text:style-name="P1"/>
      <text:p text:style-name="P2"><text:soft-page-break/><draw:frame draw:style-name="fr1" draw:name="Picture 7" text:anchor-type="as-char" svg:width="13cm" svg:height="10.088cm" draw:z-index="6"><draw:image xlink:href="Pictures/1000000100000316000002659566A97E.png" xlink:type="simple" xlink:show="embed" xlink:actuate="onLoad" draw:mime-type="image/png"/></draw:frame></text:p>
      <text:p text:style-name="P2"><text:span text:style-name="T1">Figura 5. Versión 1 — partida en curso</text:span></text:p>
      <text:p text:style-name="P1"/>
      <text:p text:style-name="P2"><draw:frame draw:style-name="fr1" draw:name="Picture 8" text:anchor-type="as-char" svg:width="13cm" svg:height="10.135cm" draw:z-index="7"><draw:image xlink:href="Pictures/100000010000031F0000026F987478D0.png" xlink:type="simple" xlink:show="embed" xlink:actuate="onLoad" draw:mime-type="image/png"/></draw:frame></text:p>
      <text:p text:style-name="P2"><text:soft-page-break/><text:span text:style-name="T1">Figura 6. Versión 2 — menú con fondo y selección de campeones</text:span></text:p>
      <text:p text:style-name="P1"/>
      <text:p text:style-name="P2"><draw:frame draw:style-name="fr1" draw:name="Picture 9" text:anchor-type="as-char" svg:width="13cm" svg:height="11.779cm" draw:z-index="8"><draw:image xlink:href="Pictures/100000010000031F000002D4C87B7EC1.png" xlink:type="simple" xlink:show="embed" xlink:actuate="onLoad" draw:mime-type="image/png"/></draw:frame></text:p>
      <text:p text:style-name="P2"><text:span text:style-name="T1">Figura 7. Versión 2 — HUD en partida</text:span></text:p>
      <text:p text:style-name="P1"/>
      <text:p text:style-name="P2"><text:soft-page-break/><draw:frame draw:style-name="fr1" draw:name="Picture 10" text:anchor-type="as-char" svg:width="13cm" svg:height="11.827cm" draw:z-index="9"><draw:image xlink:href="Pictures/100000010000031E000002D644AD6BE2.png" xlink:type="simple" xlink:show="embed" xlink:actuate="onLoad" draw:mime-type="image/png"/></draw:frame></text:p>
      <text:p text:style-name="P2"><text:span text:style-name="T1">Figura 8. Versión actual — partida con bombas y explosiones</text:span></text:p>
      <text:p text:style-name="P1"/>
      <text:p text:style-name="P2"><text:soft-page-break/><draw:frame draw:style-name="fr1" draw:name="Picture 11" text:anchor-type="as-char" svg:width="13cm" svg:height="11.949cm" draw:z-index="10"><draw:image xlink:href="Pictures/1000000100000318000002D89846E3E2.png" xlink:type="simple" xlink:show="embed" xlink:actuate="onLoad" draw:mime-type="image/png"/></draw:frame></text:p>
      <text:p text:style-name="P2"><text:span text:style-name="T1">Figura 9. Versión actual — multijugador / selección</text:span></text:p>
      <text:p text:style-name="P1"/>
      <text:p text:style-name="P2"><draw:frame draw:style-name="fr1" draw:name="Picture 12" text:anchor-type="as-char" svg:width="13cm" svg:height="7.458cm" draw:z-index="11"><draw:image xlink:href="Pictures/10000001000005EB000003658004D02F.png" xlink:type="simple" xlink:show="embed" xlink:actuate="onLoad" draw:mime-type="image/png"/></draw:frame></text:p>
      <text:p text:style-name="P2"><text:soft-page-break/><text:span text:style-name="T1">Figura 10. Repositorio del proyecto en GitHub</text:span></text:p>
      <text:p text:style-name="P1"/>
      <text:h text:style-name="P10" text:outline-level="1"><text:bookmark-start text:name="__RefHeading___Toc1600_3088266502"/><text:span text:style-name="T6">8. Manual básico de utilización</text:span><text:bookmark-end text:name="__RefHeading___Toc1600_3088266502"/></text:h>
      <text:h text:style-name="P11" text:outline-level="2"><text:bookmark-start text:name="__RefHeading___Toc1602_3088266502"/><text:span text:style-name="T6">8.1. Requisitos</text:span><text:bookmark-end text:name="__RefHeading___Toc1602_3088266502"/></text:h>
      <text:list xml:id="list234822802408907" text:continue-list="list234823187764524" text:style-name="WWNum1">
        <text:list-item>
          <text:p text:style-name="P12"><text:span text:style-name="T8">Ordenador con cualquier sistema operativo que corra Python (Windows, Linux, Mac).</text:span></text:p>
        </text:list-item>
        <text:list-item>
          <text:p text:style-name="P12"><text:span text:style-name="T8">Python 3.10 o superior.</text:span></text:p>
        </text:list-item>
        <text:list-item>
          <text:p text:style-name="P12"><text:span text:style-name="T8">Dependencias en requirements.txt (principalmente pygame).</text:span></text:p>
        </text:list-item>
      </text:list>
      <text:h text:style-name="P11" text:outline-level="2"><text:bookmark-start text:name="__RefHeading___Toc1604_3088266502"/><text:span text:style-name="T6">8.2. Instalación</text:span><text:bookmark-end text:name="__RefHeading___Toc1604_3088266502"/></text:h>
      <text:p text:style-name="P9"><text:span text:style-name="T3">No requiere instalacion, el juego final es un .exe standalone portable.</text:span></text:p>
      <text:h text:style-name="P11" text:outline-level="2"><text:bookmark-start text:name="__RefHeading___Toc1606_3088266502"/><text:span text:style-name="T6">8.3. Ejecutar el juego</text:span><text:bookmark-end text:name="__RefHeading___Toc1606_3088266502"/></text:h>
      <text:p text:style-name="P9"><text:span text:style-name="T3">Doble click en el juego</text:span></text:p>
      <text:h text:style-name="P11" text:outline-level="2"><text:bookmark-start text:name="__RefHeading___Toc1608_3088266502"/><text:span text:style-name="T6">8.4. Menú y modos de juego</text:span><text:bookmark-end text:name="__RefHeading___Toc1608_3088266502"/></text:h>
      <text:list text:continue-list="list1897166772" text:style-name="WWNum5">
        <text:list-item>
          <text:p text:style-name="P15"><text:span text:style-name="T8">INICIAR PARTIDA (local): dos jugadores en el mismo ordenador; elegir campeón y jugar.</text:span></text:p>
        </text:list-item>
        <text:list-item>
          <text:p text:style-name="P15"><text:span text:style-name="T8">CREAR PARTIDA: el host crea una sala LAN; muestra su IP; espera jugadores; INICIAR PARTIDA con mínimo 2.</text:span></text:p>
        </text:list-item>
        <text:list-item>
          <text:p text:style-name="P15"><text:span text:style-name="T8">BUSCAR PARTIDAS: el cliente lista salas en la red y se une a una.</text:span></text:p>
        </text:list-item>
        <text:list-item>
          <text:p text:style-name="P15"><text:span text:style-name="T8">SALIR o tecla ESC para volver al menú o cerrar.</text:span></text:p>
        </text:list-item>
      </text:list>
      <text:h text:style-name="P11" text:outline-level="2"><text:bookmark-start text:name="__RefHeading___Toc1610_3088266502"/><text:span text:style-name="T6">8.5. Multijugador LAN — incidencias frecuentes</text:span><text:bookmark-end text:name="__RefHeading___Toc1610_3088266502"/></text:h>
      <text:list text:continue-list="list234822802408907" text:style-name="WWNum1">
        <text:list-item>
          <text:p text:style-name="P12"><text:span text:style-name="T8">Ambos PCs en la misma red Wi‑Fi.</text:span></text:p>
        </text:list-item>
        <text:list-item>
          <text:p text:style-name="P12"><text:span text:style-name="T8">Permitir Python en el firewall de Windows (red privada).</text:span></text:p>
        </text:list-item>
        <text:list-item>
          <text:p text:style-name="P12"><text:span text:style-name="T8">Si no aparecen salas, comprobar IP del host y que el puerto no esté bloqueado.</text:span></text:p>
        </text:list-item>
      </text:list>
      <text:h text:style-name="P10" text:outline-level="1"><text:bookmark-start text:name="__RefHeading___Toc1612_3088266502"/><text:soft-page-break/><text:span text:style-name="T6">9. Dificultades encontradas</text:span><text:bookmark-end text:name="__RefHeading___Toc1612_3088266502"/></text:h>
      <text:h text:style-name="P11" text:outline-level="2"><text:bookmark-start text:name="__RefHeading___Toc1614_3088266502"/><text:span text:style-name="T6">Aprender a usar GitHub en pareja</text:span><text:bookmark-end text:name="__RefHeading___Toc1614_3088266502"/></text:h>
      <text:p text:style-name="P9"><text:span text:style-name="T3">Al principio nos costó coordinar el repositorio. Los dos trabajábamos en la misma rama y al hacer git push aparecían conflictos. Tuvimos que aprender a comunicar qué archivo tocaba cada uno, hacer pull antes de subir y, cuando hacía falta, usar ramas.</text:span></text:p>
      <text:h text:style-name="P11" text:outline-level="2"><text:bookmark-start text:name="__RefHeading___Toc1616_3088266502"/><text:span text:style-name="T6">Los GIF animados se veían como imágenes fijas</text:span><text:bookmark-end text:name="__RefHeading___Toc1616_3088266502"/></text:h>
      <text:p text:style-name="P9"><text:span text:style-name="T3">Algunos sprites se exportaron como GIF pensando que Pygame los animaría solos, pero solo se veía el primer fotograma. La solución es exportar cada frame como PNG y mostrarlos uno a uno en código.</text:span></text:p>
      <text:h text:style-name="P11" text:outline-level="2"><text:bookmark-start text:name="__RefHeading___Toc1618_3088266502"/><text:span text:style-name="T6">Controles en partida LAN</text:span><text:bookmark-end text:name="__RefHeading___Toc1618_3088266502"/></text:h>
      <text:p text:style-name="P9"><text:span text:style-name="T3">Al principio el cliente también necesitaba WASD aunque jugara solo a su personaje. Lo corregimos para que cada máquina envíe solo su entrada con las teclas del jugador 1.</text:span></text:p>
      <text:h text:style-name="P11" text:outline-level="2"><text:bookmark-start text:name="__RefHeading___Toc1620_3088266502"/><text:span text:style-name="T6">Movimiento encajado al grid</text:span><text:bookmark-end text:name="__RefHeading___Toc1620_3088266502"/></text:h>
      <text:p text:style-name="P9"><text:span text:style-name="T3">El movimiento parecía teletransporte entre casillas. Separamos posición lógica en el grid de posición en píxeles, interpolando entre celdas.</text:span></text:p>
      <text:h text:style-name="P11" text:outline-level="2"><text:bookmark-start text:name="__RefHeading___Toc1622_3088266502"/><text:span text:style-name="T6">Diseño gráfico y audio</text:span><text:bookmark-end text:name="__RefHeading___Toc1622_3088266502"/></text:h>
      <text:p text:style-name="P9"><text:span text:style-name="T3">Pasar de la versión 1 sin interfaz a menú con fondo, selección de campeones y HUD sin desordenar el estilo pixel art. BeepBox ayudó con el sonido; integrarlo en Pygame sigue en curso.</text:span></text:p>
      <text:h text:style-name="P10" text:outline-level="1"><text:bookmark-start text:name="__RefHeading___Toc1624_3088266502"/><text:span text:style-name="T6">10. Conclusiones</text:span><text:bookmark-end text:name="__RefHeading___Toc1624_3088266502"/></text:h>
      <text:h text:style-name="P11" text:outline-level="2"><text:bookmark-start text:name="__RefHeading___Toc1626_3088266502"/><text:span text:style-name="T6">Miguel Marcano (programación y arquitectura)</text:span><text:bookmark-end text:name="__RefHeading___Toc1626_3088266502"/></text:h>
      <text:p text:style-name="P9"><text:span text:style-name="T3">Hemos aprendido cosas importantes sobre el desarrollo de juegos y aplicaciones. Respecto al código, a como estructurarlo de forma modular, osea, distintos archivos python que cumplan roles distintos, y que se comuniquen entre ellos. Se aprendió a implementar librerías desconocidas (Pygame) en el proyecto, programación orientada a objetos, uso de listas y implementación de redes en el código.</text:span></text:p>
      <text:h text:style-name="P11" text:outline-level="2"><text:bookmark-start text:name="__RefHeading___Toc1628_3088266502"/><text:soft-page-break/><text:span text:style-name="T6">Gabriel Celis (diseño gráfico, audio y personajes)</text:span><text:bookmark-end text:name="__RefHeading___Toc1628_3088266502"/></text:h>
      <text:p text:style-name="P9"><text:span text:style-name="T3">He aprendido a sacarle partido a Piskel para sprites y animaciones, y a BeepBox para montar música y efectos en poco tiempo. Lo más importante ha sido coordinar con Miguel: mis PNG y sonidos tienen que encajar con lo que el código espera en assets/. El fondo del menú lo hice con ayuda de ChatGPT; el resto del arte del juego lo he hecho yo a mano en Piskel.</text:span></text:p>
      <text:h text:style-name="P11" text:outline-level="2"><text:bookmark-start text:name="__RefHeading___Toc1630_3088266502"/><text:span text:style-name="T6">Conclusión conjunta</text:span><text:bookmark-end text:name="__RefHeading___Toc1630_3088266502"/></text:h>
      <text:p text:style-name="P9"><text:span text:style-name="T3">Bomb Champions une programación, redes y diseño en un mismo proyecto. No está cerrado como un juego comercial, pero ya se puede jugar en local y por LAN, y queda una base clara para seguir con más campeones, sonido y mejoras después del PI.</text:span></text:p>
      <text:h text:style-name="P10" text:outline-level="1"><text:bookmark-start text:name="__RefHeading___Toc1632_3088266502"/><text:span text:style-name="T6">11. Posibles mejoras</text:span><text:bookmark-end text:name="__RefHeading___Toc1632_3088266502"/></text:h>
      <text:list text:continue-numbering="true" text:style-name="WWNum1">
        <text:list-item>
          <text:p text:style-name="P12"><text:span text:style-name="T8">Nuevos campeones con habilidades distintas (escudo, teletransporte, etc.).</text:span></text:p>
        </text:list-item>
        <text:list-item>
          <text:p text:style-name="P12"><text:span text:style-name="T8">IA para enemigos en modo solitario.</text:span></text:p>
        </text:list-item>
        <text:list-item>
          <text:p text:style-name="P12"><text:span text:style-name="T8">Mapas alternativos y editor de niveles.</text:span></text:p>
        </text:list-item>
        <text:list-item>
          <text:p text:style-name="P12"><text:span text:style-name="T8">Interfaz más pulida (animaciones de menú, tutorial integrado).</text:span></text:p>
        </text:list-item>
      </text:list>
      <text:h text:style-name="P10" text:outline-level="1"><text:bookmark-start text:name="__RefHeading___Toc1634_3088266502"/><text:span text:style-name="T6">12. Fuentes de información y webgrafía</text:span><text:bookmark-end text:name="__RefHeading___Toc1634_3088266502"/></text:h>
      <table:table table:name="Tabla8" table:style-name="Tabla8">
        <table:table-column table:style-name="Tabla8.A" table:number-columns-repeated="2"/>
        <table:table-row table:style-name="Tabla8.1">
          <table:table-cell table:style-name="Tabla8.A1" office:value-type="string">
            <text:p text:style-name="P13"><text:span text:style-name="T9">Referencia</text:span></text:p>
          </table:table-cell>
          <table:table-cell table:style-name="Tabla8.A1" office:value-type="string">
            <text:p text:style-name="P13"><text:span text:style-name="T9">URL</text:span></text:p>
          </table:table-cell>
        </table:table-row>
        <table:table-row table:style-name="Tabla8.1">
          <table:table-cell table:style-name="Tabla8.A1" office:value-type="string">
            <text:p text:style-name="P13"><text:span text:style-name="T10">BeepBox</text:span></text:p>
          </table:table-cell>
          <table:table-cell table:style-name="Tabla8.A1" office:value-type="string">
            <text:p text:style-name="P13"><text:span text:style-name="T10">https://www.beepbox.co/</text:span></text:p>
          </table:table-cell>
        </table:table-row>
        <table:table-row table:style-name="Tabla8.1">
          <table:table-cell table:style-name="Tabla8.A1" office:value-type="string">
            <text:p text:style-name="P13"><text:span text:style-name="T10">Documentación Pygame</text:span></text:p>
          </table:table-cell>
          <table:table-cell table:style-name="Tabla8.A1" office:value-type="string">
            <text:p text:style-name="P13"><text:span text:style-name="T10">https://www.pygame.org/docs/</text:span></text:p>
          </table:table-cell>
        </table:table-row>
        <table:table-row table:style-name="Tabla8.1">
          <table:table-cell table:style-name="Tabla8.A1" office:value-type="string">
            <text:p text:style-name="P13"><text:span text:style-name="T10">JetBrains — PyCharm</text:span></text:p>
          </table:table-cell>
          <table:table-cell table:style-name="Tabla8.A1" office:value-type="string">
            <text:p text:style-name="P13"><text:span text:style-name="T10">https://www.jetbrains.com/pycharm/</text:span></text:p>
          </table:table-cell>
        </table:table-row>
        <table:table-row table:style-name="Tabla8.1">
          <table:table-cell table:style-name="Tabla8.A1" office:value-type="string">
            <text:p text:style-name="P13"><text:span text:style-name="T10">Piskel — editor de sprites</text:span></text:p>
          </table:table-cell>
          <table:table-cell table:style-name="Tabla8.A1" office:value-type="string">
            <text:p text:style-name="P13"><text:span text:style-name="T10">https://www.piskelapp.com/</text:span></text:p>
          </table:table-cell>
        </table:table-row>
        <table:table-row table:style-name="Tabla8.1">
          <table:table-cell table:style-name="Tabla8.A1" office:value-type="string">
            <text:p text:style-name="P13"><text:span text:style-name="T10">Python — documentación oficial</text:span></text:p>
          </table:table-cell>
          <table:table-cell table:style-name="Tabla8.A1" office:value-type="string">
            <text:p text:style-name="P13"><text:span text:style-name="T10">https://docs.python.org/3/</text:span></text:p>
          </table:table-cell>
        </table:table-row>
        <table:table-row table:style-name="Tabla8.1">
          <table:table-cell table:style-name="Tabla8.A1" office:value-type="string">
            <text:p text:style-name="P13"><text:span text:style-name="T10">Wikipedia — Bomberman</text:span></text:p>
          </table:table-cell>
          <table:table-cell table:style-name="Tabla8.A1" office:value-type="string">
            <text:p text:style-name="P13"><text:span text:style-name="T10">https://es.wikipedia.org/wiki/Bomberman</text:span></text:p>
          </table:table-cell>
        </table:table-row>
        <table:table-row table:style-name="Tabla8.1">
          <table:table-cell table:style-name="Tabla8.A1" office:value-type="string">
            <text:p text:style-name="P13"><text:span text:style-name="T10">Wikipedia — Valorant</text:span></text:p>
          </table:table-cell>
          <table:table-cell table:style-name="Tabla8.A1" office:value-type="string">
            <text:p text:style-name="P13"><text:span text:style-name="T10">https://es.wikipedia.org/wiki/Valorant</text:span></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s" fo:country="E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s" fo:country="E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50%" fo:text-align="justify" style:justify-single-word="false" fo:orphans="2" fo:widows="2"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cm" fo:margin-bottom="0cm" style:contextual-spacing="false"/>
      <style:text-properties fo:font-size="15pt"/>
    </style:style>
    <style:style style:name="Contents_20_1" style:display-name="Contents 1" style:family="paragraph" style:parent-style-name="Index" style:class="index">
      <style:paragraph-properties fo:margin-left="0cm" fo:margin-top="0cm" fo:margin-bottom="0.101cm" style:contextual-spacing="false"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591cm" style:type="right" style:leader-style="dotted" style:leader-text="."/>
        </style:tab-stops>
      </style:paragraph-propertie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fo:language="es" fo:country="ES"/>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2</meta:editing-cycles>
    <meta:creation-date>2013-12-23T23:15:00</meta:creation-date>
    <dc:date>2026-05-31T23:48:22.318251300</dc:date>
    <meta:editing-duration>PT3H15M5S</meta:editing-duration>
    <meta:generator>LibreOffice/26.2.1.2$Windows_X86_64 LibreOffice_project/620$Build-2</meta:generator>
    <meta:document-statistic meta:table-count="7" meta:image-count="12" meta:object-count="0" meta:page-count="18" meta:paragraph-count="297" meta:word-count="2332" meta:character-count="14925" meta:non-whitespace-character-count="12812"/>
    <meta:user-defined meta:name="AppVersion">14.0000</meta:user-defined>
    <meta:template xlink:type="simple" xlink:actuate="onRequest" xlink:title="Normal.dotm" xlink:href=""/>
  </office:meta>
</office:document-meta>
</file>